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238cm"/>
    </style:style>
    <style:style style:name="co8" style:family="table-column">
      <style:table-column-properties fo:break-before="auto" style:column-width="1.3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lty-metrics-mod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name <text:s text:c="17"/></text:p>
          </table:table-cell>
          <table:table-cell office:value-type="string" calcext:value-type="string">
            <text:p><text:s/>classes </text:p>
          </table:table-cell>
          <table:table-cell office:value-type="string" calcext:value-type="string">
            <text:p><text:s/>funcs </text:p>
          </table:table-cell>
          <table:table-cell office:value-type="string" calcext:value-type="string">
            <text:p><text:s/>fields </text:p>
          </table:table-cell>
          <table:table-cell office:value-type="string" calcext:value-type="string">
            <text:p><text:s/>cyclo </text:p>
          </table:table-cell>
          <table:table-cell office:value-type="string" calcext:value-type="string">
            <text:p><text:s/>complex </text:p>
          </table:table-cell>
          <table:table-cell office:value-type="string" calcext:value-type="string">
            <text:p><text:s/>LCOM </text:p>
          </table:table-cell>
          <table:table-cell office:value-type="string" calcext:value-type="string">
            <text:p><text:s/>lines </text:p>
          </table:table-cell>
          <table:table-cell office:value-type="string" calcext:value-type="string">
            <text:p><text:s text:c="2"/>LOC </text:p>
          </table:table-cell>
        </table:table-row>
        <table:table-row table:style-name="ro1">
          <table:table-cell office:value-type="string" calcext:value-type="string">
            <text:p><text:s/>src/Iniciante/100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rc/Iniciante/100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0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0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0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0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0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0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1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1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1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1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18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1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2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2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src/Iniciante/103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3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03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03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04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4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4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0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1048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04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src/Iniciante/1050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5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rc/Iniciante/10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06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06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6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06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7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107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0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0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07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07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09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09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096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9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09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09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10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1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1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1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116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1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13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113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33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3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4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14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1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4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114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5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5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15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5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5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11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6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117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74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1176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7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1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1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18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182.p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118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18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8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1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18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11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19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26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147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src/Iniciante/153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54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15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5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15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7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78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2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183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84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src/Iniciante/185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86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186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8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87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191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192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93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193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19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1960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196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19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rc/Iniciante/1985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rc/Iniciante/200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00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20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rc/Iniciante/202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rc/Iniciante/203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src/Iniciante/20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rc/Iniciante/206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rc/Iniciante/20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1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src/Iniciante/2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1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15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1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164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167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168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17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17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221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23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23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31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src/Iniciante/231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rc/Iniciante/234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48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254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58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5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267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270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08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271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2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src/Iniciante/27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48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src/Iniciante/27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src/Iniciante/27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75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75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/>src/Iniciante/275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276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src/Iniciante/2779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78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278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7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src/Iniciante/279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28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862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2879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src/Iniciante/289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293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rc/Iniciante/29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298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30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30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09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src/Iniciante/3142.p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314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6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rc/Iniciante/314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rc/Iniciante/3157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src/Iniciante/3161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rc/Iniciante/3170.py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src/Iniciante/3173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rc/Iniciante/3174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src/Iniciante/3209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rc/Iniciante/3250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src/Iniciante/3252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src/Iniciante/3253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/>src/Iniciante/3255.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src/Iniciante/3256.p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TOTAL <text:s text:c="16"/>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4836" calcext:value-type="float">
            <text:p>4836</text:p>
          </table:table-cell>
          <table:table-cell office:value-type="float" office:value="2243" calcext:value-type="float">
            <text:p>2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10:16:36.915320149</dc:date>
    <meta:editing-duration>PT1M53S</meta:editing-duration>
    <meta:editing-cycles>1</meta:editing-cycles>
    <meta:generator>LibreOffice/24.2.7.2$Linux_X86_64 LibreOffice_project/420$Build-2</meta:generator>
    <meta:document-statistic meta:table-count="1" meta:cell-count="1899" meta:object-count="0"/>
  </office:meta>
</office:document-meta>
</file>