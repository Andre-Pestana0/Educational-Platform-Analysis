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238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lty-metrics-modu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 File</text:p>
          </table:table-cell>
          <table:table-cell table:style-name="Default" office:value-type="string" calcext:value-type="string">
            <text:p>Problem ID</text:p>
          </table:table-cell>
          <table:table-cell table:style-name="Default" office:value-type="string" calcext:value-type="string">
            <text:p>Difficult Level</text:p>
          </table:table-cell>
          <table:table-cell office:value-type="string" calcext:value-type="string">
            <text:p><text:s/>cyclo </text:p>
          </table:table-cell>
          <table:table-cell office:value-type="string" calcext:value-type="string">
            <text:p><text:s/>complex </text:p>
          </table:table-cell>
          <table:table-cell office:value-type="string" calcext:value-type="string">
            <text:p><text:s/>lines </text:p>
          </table:table-cell>
          <table:table-cell office:value-type="string" calcext:value-type="string">
            <text:p><text:s text:c="2"/>LOC </text:p>
          </table:table-cell>
        </table:table-row>
        <table:table-row table:style-name="ro1">
          <table:table-cell office:value-type="string" calcext:value-type="string">
            <text:p><text:s/>src/Iniciante/1000.py 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1.py </text:p>
          </table:table-cell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2.py </text:p>
          </table:table-cell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03.py 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4.py 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05.py 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6.py 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07.py 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08.py 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09.py 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10.py 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11.py 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2.py 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13.py 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4.py 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5.py 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6.py 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17.py 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8.py 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19.py 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20.py 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21.py </text:p>
          </table:table-cell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src/Iniciante/1035.py 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36.py 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037.py 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038.py 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40.py 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041.py </text:p>
          </table:table-cell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42.py </text:p>
          </table:table-cell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43.py 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4.py 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5.py 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046.py 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7.py </text:p>
          </table:table-cell>
          <table:table-cell office:value-type="float" office:value="1047" calcext:value-type="float">
            <text:p>104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1048.py 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049.py 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src/Iniciante/1050.py 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51.py 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rc/Iniciante/1052.py 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59.py 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60.py 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61.py 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64.py 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65.py 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66.py 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067.py 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0.py 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71.py 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72.py 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073.py 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74.py 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075.py 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8.py 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9.py 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80.py 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94.py 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095.py 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96.py 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97.py 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98.py 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099.py 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101.py 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13.py 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114.py 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15.py 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116.py 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17.py 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18.py 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131.py 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1132.py 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33.py </text:p>
          </table:table-cell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34.py 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42.py 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143.py 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44.py 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45.py </text:p>
          </table:table-cell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46.py 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149.py 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50.py 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53.py 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54.py 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55.py </text:p>
          </table:table-cell>
          <table:table-cell office:value-type="float" office:value="1155" calcext:value-type="float">
            <text:p>11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56.py 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57.py 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58.py 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59.py 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164.py 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65.py 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72.py 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73.py 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74.py 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76.py </text:p>
          </table:table-cell>
          <table:table-cell office:value-type="float" office:value="1176" calcext:value-type="float">
            <text:p>11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77.py 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78.py 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80.py 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81.py 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182.py </text:p>
          </table:table-cell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1183.py 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85.py 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86.py 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87.py 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188.py 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189.py 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190.py 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262.py 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1478.py 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src/Iniciante/1534.py </text:p>
          </table:table-cell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541.py </text:p>
          </table:table-cell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557.py 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564.py </text:p>
          </table:table-cell>
          <table:table-cell office:value-type="float" office:value="1564" calcext:value-type="float">
            <text:p>15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589.py 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759.py 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789.py </text:p>
          </table:table-cell>
          <table:table-cell office:value-type="float" office:value="1789" calcext:value-type="float">
            <text:p>17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27.py 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28.py 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1837.py </text:p>
          </table:table-cell>
          <table:table-cell office:value-type="float" office:value="1837" calcext:value-type="float">
            <text:p>18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848.py </text:p>
          </table:table-cell>
          <table:table-cell office:value-type="float" office:value="1848" calcext:value-type="float">
            <text:p>18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58.py </text:p>
          </table:table-cell>
          <table:table-cell office:value-type="float" office:value="1858" calcext:value-type="float">
            <text:p>1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864.py </text:p>
          </table:table-cell>
          <table:table-cell office:value-type="float" office:value="1864" calcext:value-type="float">
            <text:p>18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865.py 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866.py 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914.py </text:p>
          </table:table-cell>
          <table:table-cell office:value-type="float" office:value="1914" calcext:value-type="float">
            <text:p>19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924.py 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930.py 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33.py </text:p>
          </table:table-cell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957.py 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960.py 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963.py 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973.py 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985.py 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rc/Iniciante/2003.py 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006.py 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2028.py </text:p>
          </table:table-cell>
          <table:table-cell office:value-type="float" office:value="2028" calcext:value-type="float">
            <text:p>20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2029.py </text:p>
          </table:table-cell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2031.py 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src/Iniciante/2059.py </text:p>
          </table:table-cell>
          <table:table-cell office:value-type="float" office:value="2059" calcext:value-type="float">
            <text:p>20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rc/Iniciante/2060.py </text:p>
          </table:table-cell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rc/Iniciante/2061.py </text:p>
          </table:table-cell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140.py </text:p>
          </table:table-cell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src/Iniciante/2146.py </text:p>
          </table:table-cell>
          <table:table-cell office:value-type="float" office:value="2146" calcext:value-type="float">
            <text:p>2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47.py 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152.py 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159.py </text:p>
          </table:table-cell>
          <table:table-cell office:value-type="float" office:value="2159" calcext:value-type="float">
            <text:p>2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161.py 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2.py </text:p>
          </table:table-cell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164.py </text:p>
          </table:table-cell>
          <table:table-cell office:value-type="float" office:value="2164" calcext:value-type="float">
            <text:p>2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6.py 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7.py </text:p>
          </table:table-cell>
          <table:table-cell office:value-type="float" office:value="2167" calcext:value-type="float">
            <text:p>21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168.py </text:p>
          </table:table-cell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172.py </text:p>
          </table:table-cell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176.py </text:p>
          </table:table-cell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221.py </text:p>
          </table:table-cell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234.py </text:p>
          </table:table-cell>
          <table:table-cell office:value-type="float" office:value="2234" calcext:value-type="float">
            <text:p>2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235.py </text:p>
          </table:table-cell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310.py </text:p>
          </table:table-cell>
          <table:table-cell office:value-type="float" office:value="2310" calcext:value-type="float">
            <text:p>23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2313.py </text:p>
          </table:table-cell>
          <table:table-cell office:value-type="float" office:value="2313" calcext:value-type="float">
            <text:p>23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2344.py </text:p>
          </table:table-cell>
          <table:table-cell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483.py </text:p>
          </table:table-cell>
          <table:table-cell office:value-type="float" office:value="2483" calcext:value-type="float">
            <text:p>2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543.py </text:p>
          </table:table-cell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581.py </text:p>
          </table:table-cell>
          <table:table-cell office:value-type="float" office:value="2581" calcext:value-type="float">
            <text:p>2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670.py </text:p>
          </table:table-cell>
          <table:table-cell office:value-type="float" office:value="2670" calcext:value-type="float">
            <text:p>26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2702.py 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08.py </text:p>
          </table:table-cell>
          <table:table-cell office:value-type="float" office:value="2708" calcext:value-type="float">
            <text:p>2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2717.py </text:p>
          </table:table-cell>
          <table:table-cell office:value-type="float" office:value="2717" calcext:value-type="float">
            <text:p>27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28.py </text:p>
          </table:table-cell>
          <table:table-cell office:value-type="float" office:value="2728" calcext:value-type="float">
            <text:p>27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747.py </text:p>
          </table:table-cell>
          <table:table-cell office:value-type="float" office:value="2747" calcext:value-type="float">
            <text:p>27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48.py </text:p>
          </table:table-cell>
          <table:table-cell office:value-type="float" office:value="2748" calcext:value-type="float">
            <text:p>2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2750.py 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752.py </text:p>
          </table:table-cell>
          <table:table-cell office:value-type="float" office:value="2752" calcext:value-type="float">
            <text:p>2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753.py 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754.py </text:p>
          </table:table-cell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/>src/Iniciante/2756.py </text:p>
          </table:table-cell>
          <table:table-cell office:value-type="float" office:value="2756" calcext:value-type="float">
            <text:p>27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2763.py </text:p>
          </table:table-cell>
          <table:table-cell office:value-type="float" office:value="2763" calcext:value-type="float">
            <text:p>27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74.py 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779.py 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780.py </text:p>
          </table:table-cell>
          <table:table-cell office:value-type="float" office:value="2780" calcext:value-type="float">
            <text:p>27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2786.py </text:p>
          </table:table-cell>
          <table:table-cell office:value-type="float" office:value="2786" calcext:value-type="float">
            <text:p>2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87.py 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2791.py 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861.py </text:p>
          </table:table-cell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862.py </text:p>
          </table:table-cell>
          <table:table-cell office:value-type="float" office:value="2862" calcext:value-type="float">
            <text:p>28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879.py </text:p>
          </table:table-cell>
          <table:table-cell office:value-type="float" office:value="2879" calcext:value-type="float">
            <text:p>2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896.py </text:p>
          </table:table-cell>
          <table:table-cell office:value-type="float" office:value="2896" calcext:value-type="float">
            <text:p>28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936.py </text:p>
          </table:table-cell>
          <table:table-cell office:value-type="float" office:value="2936" calcext:value-type="float">
            <text:p>29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950.py 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987.py 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40.py 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3046.py </text:p>
          </table:table-cell>
          <table:table-cell office:value-type="float" office:value="3046" calcext:value-type="float">
            <text:p>3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47.py </text:p>
          </table:table-cell>
          <table:table-cell office:value-type="float" office:value="3047" calcext:value-type="float">
            <text:p>3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3055.py </text:p>
          </table:table-cell>
          <table:table-cell office:value-type="float" office:value="3055" calcext:value-type="float">
            <text:p>3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91.py </text:p>
          </table:table-cell>
          <table:table-cell office:value-type="float" office:value="3091" calcext:value-type="float">
            <text:p>3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0.py </text:p>
          </table:table-cell>
          <table:table-cell office:value-type="float" office:value="3140" calcext:value-type="float">
            <text:p>31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3142.py </text:p>
          </table:table-cell>
          <table:table-cell office:value-type="float" office:value="3142" calcext:value-type="float">
            <text:p>31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3145.py </text:p>
          </table:table-cell>
          <table:table-cell office:value-type="float" office:value="3145" calcext:value-type="float">
            <text:p>3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6.py </text:p>
          </table:table-cell>
          <table:table-cell office:value-type="float" office:value="3146" calcext:value-type="float">
            <text:p>3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7.py 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3157.py 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3161.py </text:p>
          </table:table-cell>
          <table:table-cell office:value-type="float" office:value="3161" calcext:value-type="float">
            <text:p>3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3170.py </text:p>
          </table:table-cell>
          <table:table-cell office:value-type="float" office:value="3170" calcext:value-type="float">
            <text:p>3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3173.py </text:p>
          </table:table-cell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3174.py </text:p>
          </table:table-cell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src/Iniciante/3209.py </text:p>
          </table:table-cell>
          <table:table-cell office:value-type="float" office:value="3209" calcext:value-type="float">
            <text:p>3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3250.py </text:p>
          </table:table-cell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src/Iniciante/3252.py </text:p>
          </table:table-cell>
          <table:table-cell office:value-type="float" office:value="3252" calcext:value-type="float">
            <text:p>32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src/Iniciante/3253.py </text:p>
          </table:table-cell>
          <table:table-cell office:value-type="float" office:value="3253" calcext:value-type="float">
            <text:p>32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/>src/Iniciante/3255.py </text:p>
          </table:table-cell>
          <table:table-cell office:value-type="float" office:value="3255" calcext:value-type="float">
            <text:p>32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src/Iniciante/3256.py </text:p>
          </table:table-cell>
          <table:table-cell office:value-type="float" office:value="3256" calcext:value-type="float">
            <text:p>32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TOTAL <text:s text:c="16"/></text:p>
          </table:table-cell>
          <table:table-cell table:style-name="Default" table:formula="of:=COUNT([.B2:.B208])" office:value-type="float" office:value="207" calcext:value-type="float">
            <text:p>207</text:p>
          </table:table-cell>
          <table:table-cell table:style-name="Default"/>
          <table:table-cell office:value-type="float" office:value="930" calcext:value-type="float">
            <text:p>930</text:p>
          </table:table-cell>
          <table:table-cell office:value-type="float" office:value="1097" calcext:value-type="float">
            <text:p>1097</text:p>
          </table:table-cell>
          <table:table-cell office:value-type="float" office:value="4836" calcext:value-type="float">
            <text:p>4836</text:p>
          </table:table-cell>
          <table:table-cell office:value-type="float" office:value="2243" calcext:value-type="float">
            <text:p>2243</text:p>
          </table:table-cell>
        </table:table-row>
      </table:table>
      <table:table table:name="qlty-metrics-modules_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<text:s/>name <text:s text:c="17"/></text:p>
          </table:table-cell>
          <table:table-cell office:value-type="string" calcext:value-type="string">
            <text:p><text:s/>classes </text:p>
          </table:table-cell>
          <table:table-cell office:value-type="string" calcext:value-type="string">
            <text:p><text:s/>funcs </text:p>
          </table:table-cell>
          <table:table-cell office:value-type="string" calcext:value-type="string">
            <text:p><text:s/>fields </text:p>
          </table:table-cell>
          <table:table-cell office:value-type="string" calcext:value-type="string">
            <text:p><text:s/>cyclo </text:p>
          </table:table-cell>
          <table:table-cell office:value-type="string" calcext:value-type="string">
            <text:p><text:s/>complex </text:p>
          </table:table-cell>
          <table:table-cell office:value-type="string" calcext:value-type="string">
            <text:p><text:s/>LCOM </text:p>
          </table:table-cell>
          <table:table-cell office:value-type="string" calcext:value-type="string">
            <text:p><text:s/>lines </text:p>
          </table:table-cell>
          <table:table-cell office:value-type="string" calcext:value-type="string">
            <text:p><text:s text:c="2"/>LOC </text:p>
          </table:table-cell>
          <table:table-cell table:style-name="Default" office:value-type="string" calcext:value-type="string">
            <text:p>Problem IID</text:p>
          </table:table-cell>
          <table:table-cell table:style-name="Default" office:value-type="string" calcext:value-type="string">
            <text:p>Difficult Level</text:p>
          </table:table-cell>
        </table:table-row>
        <table:table-row table:style-name="ro1">
          <table:table-cell office:value-type="string" calcext:value-type="string">
            <text:p><text:s/>src/Iniciante/100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0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0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0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1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1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1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1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1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18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2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2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3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3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3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3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4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4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4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047" calcext:value-type="float">
            <text:p>1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048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4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50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5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6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6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6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6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7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7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7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7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7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9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9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96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9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9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9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0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1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1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16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1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3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3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33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3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4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4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4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4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55" calcext:value-type="float">
            <text:p>1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5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5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6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7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7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76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7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8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82.p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8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8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8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8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1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9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26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4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53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54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5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5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64" calcext:value-type="float">
            <text:p>1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5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7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7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89" calcext:value-type="float">
            <text:p>1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82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8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828" calcext:value-type="float">
            <text:p>1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83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84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848" calcext:value-type="float">
            <text:p>1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85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58" calcext:value-type="float">
            <text:p>1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8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64" calcext:value-type="float">
            <text:p>1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86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8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87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/>src/Iniciante/19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14" calcext:value-type="float">
            <text:p>1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2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93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93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9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960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6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8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00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00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0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28" calcext:value-type="float">
            <text:p>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02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03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0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059" calcext:value-type="float">
            <text:p>2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06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0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46" calcext:value-type="float">
            <text:p>2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47" calcext:value-type="float">
            <text:p>2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1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6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164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64" calcext:value-type="float">
            <text:p>2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1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6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168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7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17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221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23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34" calcext:value-type="float">
            <text:p>2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23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31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310" calcext:value-type="float">
            <text:p>2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31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313" calcext:value-type="float">
            <text:p>2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3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48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83" calcext:value-type="float">
            <text:p>2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54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58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81" calcext:value-type="float">
            <text:p>2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5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/>src/Iniciante/267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670" calcext:value-type="float">
            <text:p>2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70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08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708" calcext:value-type="float">
            <text:p>2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17" calcext:value-type="float">
            <text:p>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728" calcext:value-type="float">
            <text:p>2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7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47" calcext:value-type="float">
            <text:p>2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4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48" calcext:value-type="float">
            <text:p>2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52" calcext:value-type="float">
            <text:p>2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5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5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5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756" calcext:value-type="float">
            <text:p>2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6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63" calcext:value-type="float">
            <text:p>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779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80" calcext:value-type="float">
            <text:p>2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8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79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8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86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62" calcext:value-type="float">
            <text:p>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879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79" calcext:value-type="float">
            <text:p>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89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96" calcext:value-type="float">
            <text:p>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93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936" calcext:value-type="float">
            <text:p>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9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29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0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0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46" calcext:value-type="float">
            <text:p>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0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47" calcext:value-type="float">
            <text:p>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0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55" calcext:value-type="float">
            <text:p>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09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91" calcext:value-type="float">
            <text:p>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40" calcext:value-type="float">
            <text:p>3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42.p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142" calcext:value-type="float">
            <text:p>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4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45" calcext:value-type="float">
            <text:p>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46" calcext:value-type="float">
            <text:p>3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57" calcext:value-type="float">
            <text:p>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161" calcext:value-type="float">
            <text:p>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70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170" calcext:value-type="float">
            <text:p>3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1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0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209" calcext:value-type="float">
            <text:p>3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252" calcext:value-type="float">
            <text:p>3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5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3253" calcext:value-type="float">
            <text:p>3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55" calcext:value-type="float">
            <text:p>3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3256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3256" calcext:value-type="float">
            <text:p>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TOTAL <text:s text:c="16"/>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4836" calcext:value-type="float">
            <text:p>4836</text:p>
          </table:table-cell>
          <table:table-cell office:value-type="float" office:value="2243" calcext:value-type="float">
            <text:p>2243</text:p>
          </table:table-cell>
          <table:table-cell table:style-name="Default" table:formula="of:=COUNT([.J2:.J210])" office:value-type="float" office:value="207" calcext:value-type="float">
            <text:p>207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'qlty-metrics-modules'.B1:'qlty-metrics-modules'.C1048576">
          <table:sort>
            <table:sort-by table:field-number="0" table:data-type="automatic"/>
          </table:sort>
        </table:database-range>
        <table:database-range table:name="__Anonymous_Sheet_DB__1" table:target-range-address="'qlty-metrics-modules_2'.J1:'qlty-metrics-modules_2'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1:06:42.5492036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11:15:23.049958513</dc:date>
    <meta:editing-duration>PT10M33S</meta:editing-duration>
    <meta:editing-cycles>2</meta:editing-cycles>
    <meta:generator>LibreOffice/24.2.7.2$Linux_X86_64 LibreOffice_project/420$Build-2</meta:generator>
    <meta:document-statistic meta:table-count="2" meta:cell-count="3782" meta:object-count="0"/>
  </office:meta>
</office:document-meta>
</file>